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2.144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9134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1.528in"/>
    </style:style>
    <style:style style:name="co13" style:family="table-column">
      <style:table-column-properties fo:break-before="auto" style:column-width="2.88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30"/>
    <style:style style:name="ce3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2" table:default-cell-style-name="ce4"/>
        <table:table-column table:style-name="co13" table:default-cell-style-name="Default"/>
        <table:table-row table:style-name="ro1"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Justine Floret</text:p>
          </table:table-cell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<text:a xlink:href="mailto:justine.marie.floret@gmail.com" xlink:type="simple">justine.marie.floret@gmail.com</text:a>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float" office:value="12.2025" calcext:value-type="float">
            <text:p>12.20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olumn name</text:p>
          </table:table-cell>
          <table:table-cell table:style-name="ce5" office:value-type="string" calcext:value-type="string">
            <text:p>Meaning</text:p>
          </table:table-cell>
        </table:table-row>
        <table:table-row table:style-name="ro2">
          <table:table-cell table:style-name="ce6" office:value-type="string" calcext:value-type="string">
            <text:p>Indv_ID</text:p>
          </table:table-cell>
          <table:table-cell table:style-name="ce10" office:value-type="string" calcext:value-type="string">
            <text:p>Plant unique identifier, same as in FT_exsitu.ods</text:p>
          </table:table-cell>
        </table:table-row>
        <table:table-row table:style-name="ro3">
          <table:table-cell table:style-name="ce7" office:value-type="string" calcext:value-type="string">
            <text:p>Site_ID</text:p>
          </table:table-cell>
          <table:table-cell table:style-name="ce10" office:value-type="string" calcext:value-type="string">
            <text:p>Site unique identifier from which the mother plant is coming from, same as in Ecological_parameters.ods</text:p>
          </table:table-cell>
        </table:table-row>
        <table:table-row table:style-name="ro2">
          <table:table-cell table:style-name="ce8" office:value-type="string" calcext:value-type="string">
            <text:p>Totseed_germinated</text:p>
          </table:table-cell>
          <table:table-cell table:style-name="ce10" office:value-type="string" calcext:value-type="string">
            <text:p>Number of germinated seeds at the end of the run.</text:p>
          </table:table-cell>
        </table:table-row>
        <table:table-row table:style-name="ro4">
          <table:table-cell table:style-name="ce8" office:value-type="string" calcext:value-type="string">
            <text:p>Totseed_sown</text:p>
          </table:table-cell>
          <table:table-cell table:style-name="ce10" office:value-type="string" calcext:value-type="string">
            <text:p>Total number of seeds sown</text:p>
          </table:table-cell>
        </table:table-row>
        <table:table-row table:style-name="ro4">
          <table:table-cell table:style-name="ce8" office:value-type="string" calcext:value-type="string">
            <text:p>Dormancy_start</text:p>
          </table:table-cell>
          <table:table-cell table:style-name="ce10" office:value-type="string" calcext:value-type="string">
            <text:p>Beginning of the dormancy run (DD/MM/YY).</text:p>
          </table:table-cell>
        </table:table-row>
        <table:table-row table:style-name="ro4">
          <table:table-cell table:style-name="ce8" office:value-type="string" calcext:value-type="string">
            <text:p>Dormancy_end</text:p>
          </table:table-cell>
          <table:table-cell table:style-name="ce10" office:value-type="string" calcext:value-type="string">
            <text:p>End of the dormancy run (DD/MM/YY).</text:p>
          </table:table-cell>
        </table:table-row>
        <table:table-row table:style-name="ro4">
          <table:table-cell table:style-name="ce9" office:value-type="string" calcext:value-type="string">
            <text:p>Dormancy_run</text:p>
          </table:table-cell>
          <table:table-cell table:style-name="ce10" office:value-type="string" calcext:value-type="string">
            <text:p>Dormancy experiment number (from 1 to 4).</text:p>
          </table:table-cell>
        </table:table-row>
        <table:table-row table:style-name="ro5">
          <table:table-cell table:style-name="ce20" office:value-type="string" calcext:value-type="string">
            <text:p>Run_group</text:p>
          </table:table-cell>
          <table:table-cell table:style-name="ce10" office:value-type="string" calcext:value-type="string">
            <text:p>Experimental design: in each test run, individuals were divided into three to four groups and tested within a five‑day perio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ormancy_transplanted_Indv_2025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3"/>
        <table:table-column table:style-name="co8" table:default-cell-style-name="ce2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2" office:value-type="string" calcext:value-type="string">
            <text:p>Indv_ID</text:p>
          </table:table-cell>
          <table:table-cell table:style-name="ce22" office:value-type="string" calcext:value-type="string">
            <text:p>Site_ID</text:p>
          </table:table-cell>
          <table:table-cell office:value-type="string" calcext:value-type="string">
            <text:p>Totseed_germinated</text:p>
          </table:table-cell>
          <table:table-cell office:value-type="string" calcext:value-type="string">
            <text:p>Totseed_sown</text:p>
          </table:table-cell>
          <table:table-cell table:style-name="Default" office:value-type="string" calcext:value-type="string">
            <text:p>Dormancy_start</text:p>
          </table:table-cell>
          <table:table-cell table:style-name="Default" office:value-type="string" calcext:value-type="string">
            <text:p>Dormancy_end</text:p>
          </table:table-cell>
          <table:table-cell office:value-type="string" calcext:value-type="string">
            <text:p>Dormancy_run</text:p>
          </table:table-cell>
          <table:table-cell office:value-type="string" calcext:value-type="string">
            <text:p>Run_group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4-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5-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3-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4-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2-1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-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-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6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1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19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1-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2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3-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1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-1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4-1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7-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8-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1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7-1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9-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84-1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15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-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-2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9-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-4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2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9-1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-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8-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-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3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-9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8-3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2-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4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12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5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4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-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3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4</text:p>
          </table:table-cell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7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5-1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-7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8-1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9-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0-7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13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7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4-21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7-12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1-9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4-3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3" calcext:value-type="date">
            <text:p>13/05/25</text:p>
          </table:table-cell>
          <table:table-cell office:value-type="date" office:date-value="2025-05-20" calcext:value-type="date">
            <text:p>20/05/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5-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6-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-1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-1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-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-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7-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8-1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8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9-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9-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7-1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0-1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1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3-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3-1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-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1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5-1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5-1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-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19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8-1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84-1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1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17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6-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7-8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8-2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8-4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1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8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-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8-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9-4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9-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-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-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5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-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-1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-8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-6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8-1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8-17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9-17</text:p>
          </table:table-cell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1-6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4-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1" calcext:value-type="date">
            <text:p>21/05/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5-1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5-1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5-1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7-2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isinput</text:p>
          </table:table-cell>
        </table:table-row>
        <table:table-row table:style-name="ro1">
          <table:table-cell office:value-type="string" calcext:value-type="string">
            <text:p>172-1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7-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0-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2-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6-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-1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3-4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-8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5-1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9-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-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2-10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-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6-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8-6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1-5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84-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6-6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7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8-1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4-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8-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3</text:p>
          </table:table-cell>
          <table:table-cell office:value-type="float" office:value="433" calcext:value-type="float">
            <text:p>433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5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4-3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-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1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-2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9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9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2-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3-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8-6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9-3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2-16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-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2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4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14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1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2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6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1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4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2-11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4-16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5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1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5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9-13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1-14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4-2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94-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5-22" calcext:value-type="date">
            <text:p>22/05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4-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14-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0-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9-1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4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8-1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9-1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77-1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80-4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82-4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32-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48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09-1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9-5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48-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62-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71-2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0-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7-6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4-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5-16" calcext:value-type="date">
            <text:p>16/05/25</text:p>
          </table:table-cell>
          <table:table-cell office:value-type="date" office:date-value="2025-05-23" calcext:value-type="date">
            <text:p>23/05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4-1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5-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3-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4-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2-1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-3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-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6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1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3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19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1-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2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3-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1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-1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4-1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7-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8-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7-1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9-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3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84-1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15</text:p>
          </table:table-cell>
          <table:table-cell office:value-type="float" office:value="409" calcext:value-type="float">
            <text:p>40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-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-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9-1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-4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2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4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9-13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-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8-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9-1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-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3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-9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8-3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2-3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1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4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12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5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4</text:p>
          </table:table-cell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-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3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4</text:p>
          </table:table-cell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7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5-1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-7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8-1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9-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0-7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13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7</text:p>
          </table:table-cell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4-21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7-12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1-9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4-3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03" calcext:value-type="date">
            <text:p>03/06/25</text:p>
          </table:table-cell>
          <table:table-cell office:value-type="date" office:date-value="2025-06-10" calcext:value-type="date">
            <text:p>10/06/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5-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6-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-1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-1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6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-4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-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7-1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8-1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8-11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9-5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9-6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7-16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0-1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1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3-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3-1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-7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1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5-1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5-1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-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19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5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8-1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84-1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10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6-9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7-8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8-2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8-4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2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1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8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-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8-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9-4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9-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-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9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-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5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-2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-1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-8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-6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8-15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8-17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9-17</text:p>
          </table:table-cell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1-6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4-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5" calcext:value-type="date">
            <text:p>05/06/25</text:p>
          </table:table-cell>
          <table:table-cell office:value-type="date" office:date-value="2025-06-12" calcext:value-type="date">
            <text:p>12/06/2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5-1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5-1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5-1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7-2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1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7-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0-6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2-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6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9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6-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-1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1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3-4</text:p>
          </table:table-cell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-8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5-1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9-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-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2-10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-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6-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8-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1-5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84-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6-6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7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8-10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4-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8-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3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5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4-3</text:p>
          </table:table-cell>
          <table:table-cell office:value-type="float" office:value="444" calcext:value-type="float">
            <text:p>44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-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1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-2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9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9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2-1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3-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8-6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9-3</text:p>
          </table:table-cell>
          <table:table-cell office:value-type="float" office:value="469" calcext:value-type="float">
            <text:p>46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2-16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-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4</text:p>
          </table:table-cell>
          <table:table-cell office:value-type="float" office:value="476" calcext:value-type="float">
            <text:p>47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14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11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2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6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14</text:p>
          </table:table-cell>
          <table:table-cell office:value-type="float" office:value="481" calcext:value-type="float">
            <text:p>48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4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2-11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4-16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5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18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5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9-13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1-14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4-2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94-1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4-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14-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0-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9-12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2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3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4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8-14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9-12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77-10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80-4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32-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48-14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09-16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9-5</text:p>
          </table:table-cell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47-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48-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62-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71-2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0-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4-7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7-6</text:p>
          </table:table-cell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4-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06" calcext:value-type="date">
            <text:p>06/06/25</text:p>
          </table:table-cell>
          <table:table-cell office:value-type="date" office:date-value="2025-06-13" calcext:value-type="date">
            <text:p>13/06/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4-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5-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3-1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4-4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2-18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-3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-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6</text:p>
          </table:table-cell>
          <table:table-cell office:value-type="float" office:value="191" calcext:value-type="float">
            <text:p>19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8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1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3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19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7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1-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2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3-8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1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-1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4-1</text:p>
          </table:table-cell>
          <table:table-cell office:value-type="float" office:value="344" calcext:value-type="float">
            <text:p>34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7-3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8-1</text:p>
          </table:table-cell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1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7-13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9-5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3</text:p>
          </table:table-cell>
          <table:table-cell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84-1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15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-1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-2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9-1</text:p>
          </table:table-cell>
          <table:table-cell office:value-type="float" office:value="429" calcext:value-type="float">
            <text:p>4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-4</text:p>
          </table:table-cell>
          <table:table-cell office:value-type="float" office:value="433" calcext:value-type="float">
            <text:p>433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2</text:p>
          </table:table-cell>
          <table:table-cell office:value-type="float" office:value="438" calcext:value-type="float">
            <text:p>438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4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9-1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1</text:p>
          </table:table-cell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-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8-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9-1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-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3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1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-9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8-3</text:p>
          </table:table-cell>
          <table:table-cell office:value-type="float" office:value="458" calcext:value-type="float">
            <text:p>45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2-3</text:p>
          </table:table-cell>
          <table:table-cell office:value-type="float" office:value="462" calcext:value-type="float">
            <text:p>46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1</text:p>
          </table:table-cell>
          <table:table-cell office:value-type="float" office:value="466" calcext:value-type="float">
            <text:p>46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4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12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5</text:p>
          </table:table-cell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2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4</text:p>
          </table:table-cell>
          <table:table-cell office:value-type="float" office:value="469" calcext:value-type="float">
            <text:p>46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-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3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4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7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5-1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-7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8-14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9-1</text:p>
          </table:table-cell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0-7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13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7</text:p>
          </table:table-cell>
          <table:table-cell office:value-type="float" office:value="483" calcext:value-type="float">
            <text:p>48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4-21</text:p>
          </table:table-cell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7-12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1-9</text:p>
          </table:table-cell>
          <table:table-cell office:value-type="float" office:value="491" calcext:value-type="float">
            <text:p>491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4-3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6-30" calcext:value-type="date">
            <text:p>30/06/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1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5-6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6-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-1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-1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6</text:p>
          </table:table-cell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-4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-8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7-1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8-1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8-1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9-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9-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7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7-16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9-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0-1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1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7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3-2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3-1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-7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11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5-1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5-19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-8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19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5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8-12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4</text:p>
          </table:table-cell>
          <table:table-cell office:value-type="float" office:value="359" calcext:value-type="float">
            <text:p>35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84-1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10</text:p>
          </table:table-cell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17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6-9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7-8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8-2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8-4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2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1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8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8-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9-4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9-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-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9</text:p>
          </table:table-cell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-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5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-2</text:p>
          </table:table-cell>
          <table:table-cell office:value-type="float" office:value="462" calcext:value-type="float">
            <text:p>46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-10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-8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-6</text:p>
          </table:table-cell>
          <table:table-cell office:value-type="float" office:value="476" calcext:value-type="float">
            <text:p>47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8-15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8-17</text:p>
          </table:table-cell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9-17</text:p>
          </table:table-cell>
          <table:table-cell office:value-type="float" office:value="479" calcext:value-type="float">
            <text:p>47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1-6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4-4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3" calcext:value-type="date">
            <text:p>03/07/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5-1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5-1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5-17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7-2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1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3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7-4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0-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2-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4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6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9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6-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-1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1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6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3-4</text:p>
          </table:table-cell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-8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5-1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9-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2-10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-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6-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8-6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1-5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84-6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6-6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</text:p>
          </table:table-cell>
          <table:table-cell office:value-type="float" office:value="407" calcext:value-type="float">
            <text:p>40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7</text:p>
          </table:table-cell>
          <table:table-cell office:value-type="float" office:value="407" calcext:value-type="float">
            <text:p>40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8-10</text:p>
          </table:table-cell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4-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3</text:p>
          </table:table-cell>
          <table:table-cell office:value-type="float" office:value="433" calcext:value-type="float">
            <text:p>43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5</text:p>
          </table:table-cell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1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4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4-3</text:p>
          </table:table-cell>
          <table:table-cell office:value-type="float" office:value="444" calcext:value-type="float">
            <text:p>44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1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-2</text:p>
          </table:table-cell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9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9</text:p>
          </table:table-cell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2-1</text:p>
          </table:table-cell>
          <table:table-cell office:value-type="float" office:value="462" calcext:value-type="float">
            <text:p>46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3-2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8-6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9-3</text:p>
          </table:table-cell>
          <table:table-cell office:value-type="float" office:value="469" calcext:value-type="float">
            <text:p>46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2-16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-4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5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14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6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11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6</text:p>
          </table:table-cell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14</text:p>
          </table:table-cell>
          <table:table-cell office:value-type="float" office:value="481" calcext:value-type="float">
            <text:p>48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4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2-11</text:p>
          </table:table-cell>
          <table:table-cell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4-16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1</text:p>
          </table:table-cell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2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5</text:p>
          </table:table-cell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18</text:p>
          </table:table-cell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1-14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4-2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94-1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4-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14-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0-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2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3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1-4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8-1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69-12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77-10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80-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32-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48-14</text:p>
          </table:table-cell>
          <table:table-cell office:value-type="float" office:value="348" calcext:value-type="float">
            <text:p>34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09-16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9-5</text:p>
          </table:table-cell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47-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48-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71-2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0-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4-7</text:p>
          </table:table-cell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87-6</text:p>
          </table:table-cell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4-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6-27" calcext:value-type="date">
            <text:p>27/06/25</text:p>
          </table:table-cell>
          <table:table-cell office:value-type="date" office:date-value="2025-07-04" calcext:value-type="date">
            <text:p>04/07/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4-1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5-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3-1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4-1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2-18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-3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-4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1-6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6-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3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3-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19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-7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1-2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8-20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3-8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17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7-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-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-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-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-18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4-1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7-3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8-1</text:p>
          </table:table-cell>
          <table:table-cell office:value-type="float" office:value="348" calcext:value-type="float">
            <text:p>34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-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7-13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9-5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1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1-3</text:p>
          </table:table-cell>
          <table:table-cell office:value-type="float" office:value="361" calcext:value-type="float">
            <text:p>36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84-10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9-15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-1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-2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9-1</text:p>
          </table:table-cell>
          <table:table-cell office:value-type="float" office:value="429" calcext:value-type="float">
            <text:p>42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-4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2</text:p>
          </table:table-cell>
          <table:table-cell office:value-type="float" office:value="438" calcext:value-type="float">
            <text:p>43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8-4</text:p>
          </table:table-cell>
          <table:table-cell office:value-type="float" office:value="438" calcext:value-type="float">
            <text:p>43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9-13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1-1</text:p>
          </table:table-cell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-2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8-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9-19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-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0-3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1-1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-9</text:p>
          </table:table-cell>
          <table:table-cell office:value-type="float" office:value="454" calcext:value-type="float">
            <text:p>4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8-3</text:p>
          </table:table-cell>
          <table:table-cell office:value-type="float" office:value="458" calcext:value-type="float">
            <text:p>45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2-3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1</text:p>
          </table:table-cell>
          <table:table-cell office:value-type="float" office:value="466" calcext:value-type="float">
            <text:p>46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6-14</text:p>
          </table:table-cell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12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8-5</text:p>
          </table:table-cell>
          <table:table-cell office:value-type="float" office:value="468" calcext:value-type="float">
            <text:p>46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9-4</text:p>
          </table:table-cell>
          <table:table-cell office:value-type="float" office:value="469" calcext:value-type="float">
            <text:p>46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-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3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4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-7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5-1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-7</text:p>
          </table:table-cell>
          <table:table-cell office:value-type="float" office:value="476" calcext:value-type="float">
            <text:p>47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8-14</text:p>
          </table:table-cell>
          <table:table-cell office:value-type="float" office:value="478" calcext:value-type="float">
            <text:p>47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9-1</text:p>
          </table:table-cell>
          <table:table-cell office:value-type="float" office:value="479" calcext:value-type="float">
            <text:p>479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0-7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18</text:p>
          </table:table-cell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3-7</text:p>
          </table:table-cell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4-21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7-12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89-19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1-9</text:p>
          </table:table-cell>
          <table:table-cell office:value-type="float" office:value="491" calcext:value-type="float">
            <text:p>49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94-3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2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-1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1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-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-1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2-12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13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6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3-8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2-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5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17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3-4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4-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87-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-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1-4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3-3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6-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-18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-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-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18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8-3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-3</text:p>
          </table:table-cell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-6</text:p>
          </table:table-cell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4-2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7-1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-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19</text:p>
          </table:table-cell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2-4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-13</text:p>
          </table:table-cell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-2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-1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10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-2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16</text:p>
          </table:table-cell>
          <table:table-cell office:value-type="float" office:value="347" calcext:value-type="float">
            <text:p>34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7-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1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-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9-8</text:p>
          </table:table-cell>
          <table:table-cell office:value-type="float" office:value="359" calcext:value-type="float">
            <text:p>35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-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9-4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-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8-2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9-4</text:p>
          </table:table-cell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8-7</text:p>
          </table:table-cell>
          <table:table-cell office:value-type="float" office:value="438" calcext:value-type="float">
            <text:p>43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3</text:p>
          </table:table-cell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-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7-9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-7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-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-6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-2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8-1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9-3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-2</text:p>
          </table:table-cell>
          <table:table-cell office:value-type="float" office:value="466" calcext:value-type="float">
            <text:p>466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-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2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2-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-1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-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-3</text:p>
          </table:table-cell>
          <table:table-cell office:value-type="float" office:value="477" calcext:value-type="float">
            <text:p>4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0-11</text:p>
          </table:table-cell>
          <table:table-cell office:value-type="float" office:value="480" calcext:value-type="float">
            <text:p>48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2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2-15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3-6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6-9</text:p>
          </table:table-cell>
          <table:table-cell office:value-type="float" office:value="486" calcext:value-type="float">
            <text:p>48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7-2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8-16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0</text:p>
          </table:table-cell>
          <table:table-cell office:value-type="float" office:value="489" calcext:value-type="float">
            <text:p>48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89-1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-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1-17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4-18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4-8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2" calcext:value-type="date">
            <text:p>22/07/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2-11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2-2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4-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5-10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5-1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5-6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3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6-4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1-13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-8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4-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4-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0-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2-1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6-9</text:p>
          </table:table-cell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1-2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1-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1-4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5-4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5-8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7-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8-10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8-1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9-12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9-5</text:p>
          </table:table-cell>
          <table:table-cell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9-6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15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-3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3-7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7-10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7-1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9-2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9-3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9-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0-1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0-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2-3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4-1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7-4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-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-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7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3-9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6-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13-2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-8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3-1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1</text:p>
          </table:table-cell>
          <table:table-cell office:value-type="float" office:value="241" calcext:value-type="float">
            <text:p>24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6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-7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-6</text:p>
          </table:table-cell>
          <table:table-cell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-11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-8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5-1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5-16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5-19</text:p>
          </table:table-cell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2-2</text:p>
          </table:table-cell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9-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-1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-7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2-10</text:p>
          </table:table-cell>
          <table:table-cell office:value-type="float" office:value="342" calcext:value-type="float">
            <text:p>34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2-8</text:p>
          </table:table-cell>
          <table:table-cell office:value-type="float" office:value="342" calcext:value-type="float">
            <text:p>34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4-19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-11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-5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6-7</text:p>
          </table:table-cell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8-12</text:p>
          </table:table-cell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8-14</text:p>
          </table:table-cell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8-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9-4</text:p>
          </table:table-cell>
          <table:table-cell office:value-type="float" office:value="359" calcext:value-type="float">
            <text:p>359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1-5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84-1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5-10</text:p>
          </table:table-cell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5-17</text:p>
          </table:table-cell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6-9</text:p>
          </table:table-cell>
          <table:table-cell office:value-type="float" office:value="406" calcext:value-type="float">
            <text:p>40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17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7-8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8-10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8-2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8-4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9-16</text:p>
          </table:table-cell>
          <table:table-cell office:value-type="float" office:value="409" calcext:value-type="float">
            <text:p>40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09-2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-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-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4-4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8-17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8-7</text:p>
          </table:table-cell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9-5</text:p>
          </table:table-cell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3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-15</text:p>
          </table:table-cell>
          <table:table-cell office:value-type="float" office:value="433" calcext:value-type="float">
            <text:p>43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8-8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9-4</text:p>
          </table:table-cell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4-1</text:p>
          </table:table-cell>
          <table:table-cell office:value-type="float" office:value="444" calcext:value-type="float">
            <text:p>44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4-3</text:p>
          </table:table-cell>
          <table:table-cell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7-4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8-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8-7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9-4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9-9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-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0-4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1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2-9</text:p>
          </table:table-cell>
          <table:table-cell office:value-type="float" office:value="452" calcext:value-type="float">
            <text:p>45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1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15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-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-2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6-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6-5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8-9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9-9</text:p>
          </table:table-cell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2-1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2-2</text:p>
          </table:table-cell>
          <table:table-cell office:value-type="float" office:value="462" calcext:value-type="float">
            <text:p>46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2-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3-10</text:p>
          </table:table-cell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3-2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3-8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68-6</text:p>
          </table:table-cell>
          <table:table-cell office:value-type="float" office:value="468" calcext:value-type="float">
            <text:p>46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-1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1-2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2-16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5-5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4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6-6</text:p>
          </table:table-cell>
          <table:table-cell office:value-type="float" office:value="476" calcext:value-type="float">
            <text:p>47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7-6</text:p>
          </table:table-cell>
          <table:table-cell office:value-type="float" office:value="477" calcext:value-type="float">
            <text:p>47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8-15</text:p>
          </table:table-cell>
          <table:table-cell office:value-type="float" office:value="478" calcext:value-type="float">
            <text:p>47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8-17</text:p>
          </table:table-cell>
          <table:table-cell office:value-type="float" office:value="478" calcext:value-type="float">
            <text:p>47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11</text:p>
          </table:table-cell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17</text:p>
          </table:table-cell>
          <table:table-cell office:value-type="float" office:value="479" calcext:value-type="float">
            <text:p>4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2</text:p>
          </table:table-cell>
          <table:table-cell office:value-type="float" office:value="479" calcext:value-type="float">
            <text:p>47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9-6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0-5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14</text:p>
          </table:table-cell>
          <table:table-cell office:value-type="float" office:value="481" calcext:value-type="float">
            <text:p>48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4</text:p>
          </table:table-cell>
          <table:table-cell office:value-type="float" office:value="481" calcext:value-type="float">
            <text:p>48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1-6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4-16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4-7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</text:p>
          </table:table-cell>
          <table:table-cell office:value-type="float" office:value="486" calcext:value-type="float">
            <text:p>486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1</text:p>
          </table:table-cell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2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6-15</text:p>
          </table:table-cell>
          <table:table-cell office:value-type="float" office:value="486" calcext:value-type="float">
            <text:p>486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6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7-7</text:p>
          </table:table-cell>
          <table:table-cell office:value-type="float" office:value="487" calcext:value-type="float">
            <text:p>487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8-5</text:p>
          </table:table-cell>
          <table:table-cell office:value-type="float" office:value="488" calcext:value-type="float">
            <text:p>488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89-13</text:p>
          </table:table-cell>
          <table:table-cell office:value-type="float" office:value="489" calcext:value-type="float">
            <text:p>48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9-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94-1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94-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94-4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6" calcext:value-type="date">
            <text:p>16/07/25</text:p>
          </table:table-cell>
          <table:table-cell office:value-type="date" office:date-value="2025-07-23" calcext:value-type="date">
            <text:p>23/07/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4-1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5-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3-1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4-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2-18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67-3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69-4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1-6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6-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6-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13-3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13-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33-19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33-7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41-2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58-20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63-8</text:p>
          </table:table-cell>
          <table:table-cell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67-17</text:p>
          </table:table-cell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67-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7-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9-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4-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42-18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44-1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47-3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48-1</text:p>
          </table:table-cell>
          <table:table-cell office:value-type="float" office:value="348" calcext:value-type="float">
            <text:p>348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-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7-13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9-5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61-1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61-3</text:p>
          </table:table-cell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84-10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06-14</text:p>
          </table:table-cell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09-15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1-1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24-2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29-1</text:p>
          </table:table-cell>
          <table:table-cell office:value-type="float" office:value="429" calcext:value-type="float">
            <text:p>42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33-4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38-2</text:p>
          </table:table-cell>
          <table:table-cell office:value-type="float" office:value="438" calcext:value-type="float">
            <text:p>43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38-4</text:p>
          </table:table-cell>
          <table:table-cell office:value-type="float" office:value="438" calcext:value-type="float">
            <text:p>43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39-13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41-1</text:p>
          </table:table-cell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44-2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48-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49-19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-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0-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0-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0-3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1-1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4-9</text:p>
          </table:table-cell>
          <table:table-cell office:value-type="float" office:value="454" calcext:value-type="float">
            <text:p>45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58-3</text:p>
          </table:table-cell>
          <table:table-cell office:value-type="float" office:value="458" calcext:value-type="float">
            <text:p>45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2-3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6-1</text:p>
          </table:table-cell>
          <table:table-cell office:value-type="float" office:value="466" calcext:value-type="float">
            <text:p>46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6-4</text:p>
          </table:table-cell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8-12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8-5</text:p>
          </table:table-cell>
          <table:table-cell office:value-type="float" office:value="468" calcext:value-type="float">
            <text:p>468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9-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69-4</text:p>
          </table:table-cell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-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1-3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1-4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1-7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5-1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6-7</text:p>
          </table:table-cell>
          <table:table-cell office:value-type="float" office:value="476" calcext:value-type="float">
            <text:p>47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8-14</text:p>
          </table:table-cell>
          <table:table-cell office:value-type="float" office:value="478" calcext:value-type="float">
            <text:p>47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9-1</text:p>
          </table:table-cell>
          <table:table-cell office:value-type="float" office:value="479" calcext:value-type="float">
            <text:p>479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80-7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83-13</text:p>
          </table:table-cell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83-7</text:p>
          </table:table-cell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84-21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87-12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89-19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91-9</text:p>
          </table:table-cell>
          <table:table-cell office:value-type="float" office:value="491" calcext:value-type="float">
            <text:p>49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94-3</text:p>
          </table:table-cell>
          <table:table-cell office:value-type="float" office:value="494" calcext:value-type="float">
            <text:p>49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-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date" office:date-value="2025-07-14" calcext:value-type="date">
            <text:p>14/07/25</text:p>
          </table:table-cell>
          <table:table-cell office:value-type="date" office:date-value="2025-07-21" calcext:value-type="date">
            <text:p>21/07/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  <table:database-ranges>
        <table:database-range table:name="__Anonymous_Sheet_DB__1" table:target-range-address="dormancy_transplanted_Indv_2025.A1:dormancy_transplanted_Indv_2025.H1778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number:date-style style:name="N130" number:title="User-defined">
      <number:day number:style="long"/>
      <number:text>/</number:text>
      <number:month number:style="long"/>
      <number:text>/</number:text>
      <number:year/>
    </number:date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/>
      <number:text>-</number:text>
      <number:month/>
    </number:date-style>
    <number:date-style style:name="N136">
      <number:day/>
      <number:text>/</number:text>
      <number:month/>
      <number:text>/</number:text>
      <number:year number:style="long"/>
    </number:date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date-style style:name="N138">
      <number:day number:style="long"/>
      <number:text>/</number:text>
      <number:month number:style="long"/>
    </number:date-style>
    <number:date-style style:name="N139">
      <number:month number:style="long"/>
      <number:text>/</number:text>
      <number:year number:style="long"/>
    </number:date-style>
    <number:date-style style:name="N140">
      <number:day/>
      <number:text>.</number:text>
      <number:month/>
    </number:date-style>
    <number:date-style style:name="N141">
      <number:day/>
      <number:text>.</number:text>
      <number:month/>
      <number:text>.</number:text>
    </number:date-style>
    <number:date-style style:name="N142">
      <number:day number:style="long"/>
      <number:text>.</number:text>
      <number:month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1:21:48.486626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8T11:26:54.208875775</dc:date>
    <meta:editing-duration>PT30M43S</meta:editing-duration>
    <meta:editing-cycles>9</meta:editing-cycles>
    <meta:generator>LibreOffice/24.2.7.2$Linux_X86_64 LibreOffice_project/420$Build-2</meta:generator>
    <meta:document-statistic meta:table-count="2" meta:cell-count="14249" meta:object-count="0"/>
  </office:meta>
</office:document-meta>
</file>