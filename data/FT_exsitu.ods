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3.7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0.9339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4972in"/>
    </style:style>
    <style:style style:name="co12" style:family="table-column">
      <style:table-column-properties fo:break-before="auto" style:column-width="2.9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37"/>
    <style:style style:name="ce15" style:family="table-cell" style:parent-style-name="Default" style:data-style-name="N130"/>
    <style:style style:name="ce14" style:family="table-cell" style:parent-style-name="Default" style:data-style-name="N37"/>
    <style:style style:name="ce16" style:family="table-cell" style:parent-style-name="Default" style:data-style-name="N20037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ce7"/>
        <table:table-column table:style-name="co2" table:default-cell-style-name="ce10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Justine Floret</text:p>
          </table:table-cell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<text:a xlink:href="mailto:justine.marie.floret@gmail.com" xlink:type="simple">justine.marie.floret@gmail.com</text:a></text:p>
          </table:table-cell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float" office:value="12.2025" calcext:value-type="float">
            <text:p>12.202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Column name</text:p>
          </table:table-cell>
          <table:table-cell table:style-name="ce5" office:value-type="string" calcext:value-type="string">
            <text:p>Meaning</text:p>
          </table:table-cell>
        </table:table-row>
        <table:table-row table:style-name="ro1">
          <table:table-cell table:style-name="ce6" office:value-type="string" calcext:value-type="string">
            <text:p>Indv_ID</text:p>
          </table:table-cell>
          <table:table-cell office:value-type="string" calcext:value-type="string">
            <text:p>Plant unique identifier, same as in Dormancy_exsitu.ods</text:p>
          </table:table-cell>
        </table:table-row>
        <table:table-row table:style-name="ro2">
          <table:table-cell office:value-type="string" calcext:value-type="string">
            <text:p>Site_ID</text:p>
          </table:table-cell>
          <table:table-cell office:value-type="string" calcext:value-type="string">
            <text:p>Site unique identifier from which the mother plant is coming from, same as in Ecological_parameters.ods</text:p>
          </table:table-cell>
        </table:table-row>
        <table:table-row table:style-name="ro1">
          <table:table-cell table:style-name="ce8" office:value-type="string" calcext:value-type="string">
            <text:p>Individual_F5_parent</text:p>
          </table:table-cell>
          <table:table-cell office:value-type="string" calcext:value-type="string">
            <text:p>Mother plant number.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Tray number, experimental design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oumn number, experimental design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lowering time day (DD/MM/YY)</text:p>
          </table:table-cell>
        </table:table-row>
        <table:table-row table:style-name="ro1">
          <table:table-cell table:style-name="ce9" office:value-type="string" calcext:value-type="string">
            <text:p>Sowing_data</text:p>
          </table:table-cell>
          <table:table-cell office:value-type="string" calcext:value-type="string">
            <text:p>Sowing day (DD/MM/YY)</text:p>
          </table:table-cell>
        </table:table-row>
        <table:table-row table:style-name="ro1">
          <table:table-cell table:style-name="ce9" office:value-type="string" calcext:value-type="string">
            <text:p>End_stratification</text:p>
          </table:table-cell>
          <table:table-cell office:value-type="string" calcext:value-type="string">
            <text:p>Date of the end of stratification treatment (DD/MM/YY)</text:p>
          </table:table-cell>
        </table:table-row>
      </table:table>
      <table:table table:name="F6_tplant_FT_2025" table:style-name="ta1"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2"/>
        <table:table-column table:style-name="co11" table:number-columns-repeated="2" table:default-cell-style-name="ce14"/>
        <table:table-column table:style-name="co12" table:default-cell-style-name="ce8"/>
        <table:table-column table:style-name="co3" table:number-columns-repeated="16374" table:default-cell-style-name="ce8"/>
        <table:table-row table:style-name="ro1">
          <table:table-cell office:value-type="string" calcext:value-type="string">
            <text:p>Indv_ID</text:p>
          </table:table-cell>
          <table:table-cell office:value-type="string" calcext:value-type="string">
            <text:p>Site_ID</text:p>
          </table:table-cell>
          <table:table-cell office:value-type="string" calcext:value-type="string">
            <text:p>Individual_F5_parent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ow</text:p>
          </table:table-cell>
          <table:table-cell table:style-name="ce19" office:value-type="string" calcext:value-type="string">
            <text:p>FT</text:p>
          </table:table-cell>
          <table:table-cell table:style-name="ce21" office:value-type="string" calcext:value-type="string">
            <text:p>Sowing_data</text:p>
          </table:table-cell>
          <table:table-cell table:style-name="ce21" office:value-type="string" calcext:value-type="string">
            <text:p>End_stratific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2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-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11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8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2-9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2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6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8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19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6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7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4-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1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4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7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-9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6-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6-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6-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6-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10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12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1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13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0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3-8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4-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4-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4-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4-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-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-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-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1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3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4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7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19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6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-9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1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2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3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6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17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8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6-9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1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2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4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6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17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4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6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9-8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1-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1-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1-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1-4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7-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7-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7-4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0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1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7</text:p>
          </table:table-cell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19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20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4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8-6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11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12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16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18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5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6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7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9-8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10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14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15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3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7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8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2-9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16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17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18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19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3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7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3-9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1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12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16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18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19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2025-06-14" calcext:value-type="date">
            <text:p>06/1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4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7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-9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9-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9-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9-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9-4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1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11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3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0-9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2-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2-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2-4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3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4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6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19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3-9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1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2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4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5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6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7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18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20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7-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7-3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7-4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87-6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-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-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-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3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7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91-8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10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11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4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7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8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3-9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6-4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13-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13-2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0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4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7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3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6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2-9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1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4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5</text:p>
          </table:table-cell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7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8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2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6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3-8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1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3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4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5-06-14" calcext:value-type="date">
            <text:p>06/1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6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1-7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5-6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0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3</text:p>
          </table:table-cell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5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19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21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58-9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25-06-13" calcext:value-type="date">
            <text:p>06/1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12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14</text:p>
          </table:table-cell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15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17</text:p>
          </table:table-cell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20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4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7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10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11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12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13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3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7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8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4-9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0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1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3</text:p>
          </table:table-cell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4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6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8</text:p>
          </table:table-cell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19</text:p>
          </table:table-cell>
          <table:table-cell office:value-type="float" office:value="265" calcext:value-type="float">
            <text:p>26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21</text:p>
          </table:table-cell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7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5-9</text:p>
          </table:table-cell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0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1</text:p>
          </table:table-cell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2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4</text:p>
          </table:table-cell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6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7-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11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13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20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7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8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82-9</text:p>
          </table:table-cell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9-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5-1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5-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5-3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5-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1</text:p>
          </table:table-cell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2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3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5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6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18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2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7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08-9</text:p>
          </table:table-cell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14</text:p>
          </table:table-cell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7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7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9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0-9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1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1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0</text:p>
          </table:table-cell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7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19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5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7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8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2-9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12</text:p>
          </table:table-cell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13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16</text:p>
          </table:table-cell>
          <table:table-cell office:value-type="float" office:value="344" calcext:value-type="float">
            <text:p>34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19</text:p>
          </table:table-cell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3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8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4-9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1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2</text:p>
          </table:table-cell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5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7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19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2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6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5-8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1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7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8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19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2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5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6-7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11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12</text:p>
          </table:table-cell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18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19</text:p>
          </table:table-cell>
          <table:table-cell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2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4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6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0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2</text:p>
          </table:table-cell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4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5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19</text:p>
          </table:table-cell>
          <table:table-cell office:value-type="float" office:value="348" calcext:value-type="float">
            <text:p>3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20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3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4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8-6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1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-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10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12</text:p>
          </table:table-cell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15</text:p>
          </table:table-cell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20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0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5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7-7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1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10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2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office:value-type="string" calcext:value-type="string">
            <text:p><text:s/>red colo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9-3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4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6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7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9-9</text:p>
          </table:table-cell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1-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1-4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1-5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14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17</text:p>
          </table:table-cell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3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5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84-7</text:p>
          </table:table-cell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10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11</text:p>
          </table:table-cell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14</text:p>
          </table:table-cell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17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18</text:p>
          </table:table-cell>
          <table:table-cell office:value-type="float" office:value="405" calcext:value-type="float">
            <text:p>40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2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2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3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5-7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1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11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12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4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5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6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7</text:p>
          </table:table-cell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6-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1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10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16</text:p>
          </table:table-cell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17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19</text:p>
          </table:table-cell>
          <table:table-cell office:value-type="float" office:value="407" calcext:value-type="float">
            <text:p>40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4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5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7</text:p>
          </table:table-cell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8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7-9</text:p>
          </table:table-cell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10</text:p>
          </table:table-cell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2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3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4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8-6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1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11</text:p>
          </table:table-cell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16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2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3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-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4-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4-4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1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2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5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7</text:p>
          </table:table-cell>
          <table:table-cell office:value-type="float" office:value="428" calcext:value-type="float">
            <text:p>4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19</text:p>
          </table:table-cell>
          <table:table-cell office:value-type="float" office:value="428" calcext:value-type="float">
            <text:p>4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7</text:p>
          </table:table-cell>
          <table:table-cell office:value-type="float" office:value="428" calcext:value-type="float">
            <text:p>4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8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8-9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9-2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9-3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0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9-5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1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2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3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4</text:p>
          </table:table-cell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5</text:p>
          </table:table-cell>
          <table:table-cell office:value-type="float" office:value="433" calcext:value-type="float">
            <text:p>4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8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19</text:p>
          </table:table-cell>
          <table:table-cell office:value-type="float" office:value="433" calcext:value-type="float">
            <text:p>43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3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3-9</text:p>
          </table:table-cell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11</text:p>
          </table:table-cell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12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13</text:p>
          </table:table-cell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15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5</text:p>
          </table:table-cell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8-8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1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10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12</text:p>
          </table:table-cell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14</text:p>
          </table:table-cell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2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4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5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7</text:p>
          </table:table-cell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39-9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1-2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8/0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4-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4-3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4-4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10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2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3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4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5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7</text:p>
          </table:table-cell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8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12</text:p>
          </table:table-cell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15</text:p>
          </table:table-cell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1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18</text:p>
          </table:table-cell>
          <table:table-cell office:value-type="float" office:value="448" calcext:value-type="float">
            <text:p>44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5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6</text:p>
          </table:table-cell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7</text:p>
          </table:table-cell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8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8-9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1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5</text:p>
          </table:table-cell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7</text:p>
          </table:table-cell>
          <table:table-cell office:value-type="float" office:value="449" calcext:value-type="float">
            <text:p>44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8</text:p>
          </table:table-cell>
          <table:table-cell office:value-type="float" office:value="449" calcext:value-type="float">
            <text:p>44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19</text:p>
          </table:table-cell>
          <table:table-cell office:value-type="float" office:value="449" calcext:value-type="float">
            <text:p>44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21</text:p>
          </table:table-cell>
          <table:table-cell office:value-type="float" office:value="449" calcext:value-type="float">
            <text:p>4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3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4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49-9</text:p>
          </table:table-cell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1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1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0-4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10</text:p>
          </table:table-cell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13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0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13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14</text:p>
          </table:table-cell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2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6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1-8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1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3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4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6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2-9</text:p>
          </table:table-cell>
          <table:table-cell office:value-type="float" office:value="452" calcext:value-type="float">
            <text:p>45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10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10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11</text:p>
          </table:table-cell>
          <table:table-cell office:value-type="float" office:value="453" calcext:value-type="float">
            <text:p>4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15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16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2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7</text:p>
          </table:table-cell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8</text:p>
          </table:table-cell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3-9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2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3</text:p>
          </table:table-cell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4</text:p>
          </table:table-cell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5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7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8</text:p>
          </table:table-cell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3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5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6-6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11</text:p>
          </table:table-cell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12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16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2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4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5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8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8-9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10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12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4</text:p>
          </table:table-cell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5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7</text:p>
          </table:table-cell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8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59-9</text:p>
          </table:table-cell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2-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2-2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2-4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2-5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10</text:p>
          </table:table-cell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11</text:p>
          </table:table-cell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2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3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4</text:p>
          </table:table-cell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6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7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8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3-9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14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16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4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5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6</text:p>
          </table:table-cell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7</text:p>
          </table:table-cell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8</text:p>
          </table:table-cell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6-9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10</text:p>
          </table:table-cell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11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16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17</text:p>
          </table:table-cell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4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6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8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8-9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9-1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9-3</text:p>
          </table:table-cell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1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-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1-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1-2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11</text:p>
          </table:table-cell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15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16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06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17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19</text:p>
          </table:table-cell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20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5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2-7</text:p>
          </table:table-cell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12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18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19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8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20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4</text:p>
          </table:table-cell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6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7</text:p>
          </table:table-cell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4-8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5-2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5-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6-1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6-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6-4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6-6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1</text:p>
          </table:table-cell>
          <table:table-cell office:value-type="float" office:value="477" calcext:value-type="float">
            <text:p>4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4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5</text:p>
          </table:table-cell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6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7</text:p>
          </table:table-cell>
          <table:table-cell office:value-type="float" office:value="477" calcext:value-type="float">
            <text:p>47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18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6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7-8</text:p>
          </table:table-cell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0</text:p>
          </table:table-cell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1</text:p>
          </table:table-cell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2</text:p>
          </table:table-cell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3</text:p>
          </table:table-cell>
          <table:table-cell office:value-type="float" office:value="478" calcext:value-type="float">
            <text:p>4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5</text:p>
          </table:table-cell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7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18</text:p>
          </table:table-cell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13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2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8-8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10</text:p>
          </table:table-cell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11</text:p>
          </table:table-cell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16</text:p>
          </table:table-cell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17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2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4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6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7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9-8</text:p>
          </table:table-cell>
          <table:table-cell office:value-type="float" office:value="479" calcext:value-type="float">
            <text:p>4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13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office:value-type="string" calcext:value-type="string">
            <text:p><text:s/>but too small for leaf morphology determin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0-15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2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6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1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12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13</text:p>
          </table:table-cell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14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2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3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4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6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0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1-7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1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11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17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2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3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4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7</text:p>
          </table:table-cell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2-9</text:p>
          </table:table-cell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10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12</text:p>
          </table:table-cell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13</text:p>
          </table:table-cell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15</text:p>
          </table:table-cell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16</text:p>
          </table:table-cell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20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3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4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1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15</text:p>
          </table:table-cell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16</text:p>
          </table:table-cell>
          <table:table-cell office:value-type="float" office:value="484" calcext:value-type="float">
            <text:p>48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18</text:p>
          </table:table-cell>
          <table:table-cell office:value-type="float" office:value="484" calcext:value-type="float">
            <text:p>4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20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3</text:p>
          </table:table-cell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7</text:p>
          </table:table-cell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8</text:p>
          </table:table-cell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4-9</text:p>
          </table:table-cell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0</text:p>
          </table:table-cell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1</text:p>
          </table:table-cell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2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4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15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3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6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8</text:p>
          </table:table-cell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4</text:p>
          </table:table-cell>
          <table:table-cell office:value-type="float" office:value="487" calcext:value-type="float">
            <text:p>48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6</text:p>
          </table:table-cell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8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19</text:p>
          </table:table-cell>
          <table:table-cell office:value-type="float" office:value="487" calcext:value-type="float">
            <text:p>48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6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7</text:p>
          </table:table-cell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7-8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1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12</text:p>
          </table:table-cell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office:value-type="string" calcext:value-type="string">
            <text:p><text:s/>but too small for leaf morphology determin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8-15</text:p>
          </table:table-cell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3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2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17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18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2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3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5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8-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1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2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3</text:p>
          </table:table-cell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4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5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2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4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89-7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1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07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11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06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1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3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6/2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-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13</text:p>
          </table:table-cell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14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18</text:p>
          </table:table-cell>
          <table:table-cell office:value-type="float" office:value="491" calcext:value-type="float">
            <text:p>49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4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2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3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5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7/3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8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1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10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29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12</text:p>
          </table:table-cell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14</text:p>
          </table:table-cell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1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2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08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20</text:p>
          </table:table-cell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/01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4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94-9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4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19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05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3" calcext:value-type="date">
            <text:p>23/05/25</text:p>
          </table:table-cell>
          <table:table-cell table:style-name="ce16" office:value-type="date" office:date-value="2025-05-28" calcext:value-type="date">
            <text:p>28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7/1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-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1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16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2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1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28/25</text:p>
          </table:table-cell>
          <table:table-cell table:style-name="ce15" office:value-type="date" office:date-value="2025-05-22" calcext:value-type="date">
            <text:p>22/05/25</text:p>
          </table:table-cell>
          <table:table-cell table:style-name="ce16" office:value-type="date" office:date-value="2025-05-27" calcext:value-type="date">
            <text:p>27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8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27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25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0" calcext:value-type="date">
            <text:p>20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4-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4-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23/25</text:p>
          </table:table-cell>
          <table:table-cell table:style-name="ce15" office:value-type="date" office:date-value="2025-05-19" calcext:value-type="date">
            <text:p>19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4-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/10/25</text:p>
          </table:table-cell>
          <table:table-cell table:style-name="ce15" office:value-type="date" office:date-value="2025-05-21" calcext:value-type="date">
            <text:p>21/05/25</text:p>
          </table:table-cell>
          <table:table-cell table:style-name="ce16" office:value-type="date" office:date-value="2025-05-26" calcext:value-type="date">
            <text:p>26/05/25</text:p>
          </table:table-cell>
          <table:table-cell table:number-columns-repeated="16375"/>
        </table:table-row>
        <table:table-row table:style-name="ro1" table:number-rows-repeated="10476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F6_tplant_FT_2025.A1:F6_tplant_FT_2025.I9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number:date-style style:name="N130">
      <number:day number:style="long"/>
      <number:text>/</number:text>
      <number:month number:style="long"/>
      <number:text>/</number:text>
      <number:year/>
    </number:dat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/>
      <number:text>-</number:text>
      <number:month/>
    </number:date-style>
    <number:date-style style:name="N136">
      <number:day/>
      <number:text>/</number:text>
      <number:month/>
      <number:text>/</number:text>
      <number:year number:style="long"/>
    </number:date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date-style style:name="N138">
      <number:day number:style="long"/>
      <number:text>/</number:text>
      <number:month number:style="long"/>
    </number:date-style>
    <number:date-style style:name="N139">
      <number:month number:style="long"/>
      <number:text>/</number:text>
      <number:year number:style="long"/>
    </number:date-style>
    <number:date-style style:name="N140">
      <number:day/>
      <number:text>.</number:text>
      <number:month/>
    </number:date-style>
    <number:date-style style:name="N141">
      <number:day/>
      <number:text>.</number:text>
      <number:month/>
      <number:text>.</number:text>
    </number:date-style>
    <number:date-style style:name="N142">
      <number:day number:style="long"/>
      <number:text>.</number:text>
      <number:month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9:37:42.895814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17T19:38:57.195351262</dc:date>
    <meta:editing-duration>PT1H12M46S</meta:editing-duration>
    <meta:editing-cycles>8</meta:editing-cycles>
    <meta:document-statistic meta:table-count="2" meta:cell-count="8622" meta:object-count="0"/>
  </office:meta>
</office:document-meta>
</file>