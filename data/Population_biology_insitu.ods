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917in"/>
    </style:style>
    <style:style style:name="co2" style:family="table-column">
      <style:table-column-properties fo:break-before="auto" style:column-width="3.7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0055in"/>
    </style:style>
    <style:style style:name="co14" style:family="table-column">
      <style:table-column-properties fo:break-before="auto" style:column-width="0.6252in"/>
    </style:style>
    <style:style style:name="co15" style:family="table-column">
      <style:table-column-properties fo:break-before="auto" style:column-width="0.8398in"/>
    </style:style>
    <style:style style:name="co16" style:family="table-column">
      <style:table-column-properties fo:break-before="auto" style:column-width="0.9791in"/>
    </style:style>
    <style:style style:name="co17" style:family="table-column">
      <style:table-column-properties fo:break-before="auto" style:column-width="1.2689in"/>
    </style:style>
    <style:style style:name="co18" style:family="table-column">
      <style:table-column-properties fo:break-before="auto" style:column-width="1.2146in"/>
    </style:style>
    <style:style style:name="co19" style:family="table-column">
      <style:table-column-properties fo:break-before="auto" style:column-width="0.8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98in" fo:break-before="auto" style:use-optimal-row-height="fals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4583in" fo:break-before="auto" style:use-optimal-row-height="false"/>
    </style:style>
    <style:style style:name="ro5" style:family="table-row">
      <style:table-row-properties style:row-height="0.4736in" fo:break-before="auto" style:use-optimal-row-height="false"/>
    </style:style>
    <style:style style:name="ro6" style:family="table-row">
      <style:table-row-properties style:row-height="0.4217in" fo:break-before="auto" style:use-optimal-row-height="false"/>
    </style:style>
    <style:style style:name="ro7" style:family="table-row">
      <style:table-row-properties style:row-height="0.4516in" fo:break-before="auto" style:use-optimal-row-height="false"/>
    </style:style>
    <style:style style:name="ro8" style:family="table-row">
      <style:table-row-properties style:row-height="0.8661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ro10" style:family="table-row">
      <style:table-row-properties style:row-height="0.2882in" fo:break-before="auto" style:use-optimal-row-height="false"/>
    </style:style>
    <style:style style:name="ro11" style:family="table-row">
      <style:table-row-properties style:row-height="0.3181in" fo:break-before="auto" style:use-optimal-row-height="false"/>
    </style:style>
    <style:style style:name="ro12" style:family="table-row">
      <style:table-row-properties style:row-height="0.3102in" fo:break-before="auto" style:use-optimal-row-height="false"/>
    </style:style>
    <style:style style:name="ro13" style:family="table-row">
      <style:table-row-properties style:row-height="0.3035in" fo:break-before="auto" style:use-optimal-row-height="false"/>
    </style:style>
    <style:style style:name="ro14" style:family="table-row">
      <style:table-row-properties style:row-height="0.9693in" fo:break-before="auto" style:use-optimal-row-height="false"/>
    </style:style>
    <style:style style:name="ro15" style:family="table-row">
      <style:table-row-properties style:row-height="0.6437in" fo:break-before="auto" style:use-optimal-row-height="false"/>
    </style:style>
    <style:style style:name="ro16" style:family="table-row">
      <style:table-row-properties style:row-height="0.6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16382" table:default-cell-style-name="Default"/>
        <table:table-row table:style-name="ro1"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Justine Floret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<text:a xlink:href="mailto:justine.marie.floret@gmail.com" xlink:type="simple">justine.marie.floret@gmail.com</text:a>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float" office:value="12.2025" calcext:value-type="float">
            <text:p>12.2025</text:p>
          </table:table-cell>
          <table:table-cell table:number-columns-repeated="16382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Mean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te_ID</text:p>
          </table:table-cell>
          <table:table-cell office:value-type="string" calcext:value-type="string">
            <text:p>Site unique identifier </text:p>
          </table:table-cell>
          <table:table-cell table:number-columns-repeated="28"/>
          <table:table-cell table:style-name="ce1" table:number-columns-repeated="16354"/>
        </table:table-row>
        <table:table-row table:style-name="ro2">
          <table:table-cell office:value-type="string" calcext:value-type="string">
            <text:p>Area</text:p>
          </table:table-cell>
          <table:table-cell office:value-type="string" calcext:value-type="string">
            <text:p>Cologne area name of the si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PS_ID</text:p>
          </table:table-cell>
          <table:table-cell office:value-type="string" calcext:value-type="string">
            <text:p>GPS unique identifi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PS_coordinate</text:p>
          </table:table-cell>
          <table:table-cell office:value-type="string" calcext:value-type="string">
            <text:p>GPS coordinat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Habitat type of the site </text:p>
            <text:p>(Meadow, Pavement, Tree bed, Wall)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Destroyed</text:p>
          </table:table-cell>
          <table:table-cell office:value-type="string" calcext:value-type="string">
            <text:p>Date of the site observed destruction (MM/YYYY)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Sowing_1st</text:p>
          </table:table-cell>
          <table:table-cell office:value-type="string" calcext:value-type="string">
            <text:p>Date of the first sowing at the site (MM/YYYY)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6377"/>
        </table:table-row>
        <table:table-row table:style-name="ro5">
          <table:table-cell office:value-type="string" calcext:value-type="string">
            <text:p>Sowing_2nd</text:p>
          </table:table-cell>
          <table:table-cell office:value-type="string" calcext:value-type="string">
            <text:p>Date of the second sowing at the site (MM/YYY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ence_April_22</text:p>
          </table:table-cell>
          <table:table-cell table:style-name="ce7" office:value-type="string" calcext:value-type="string">
            <text:p>Presence or absence of Arabidopsis thaliana In April 2022 (Yes, No)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Presence_April_23</text:p>
          </table:table-cell>
          <table:table-cell table:style-name="ce7" office:value-type="string" calcext:value-type="string">
            <text:p>Presence or absence of Arabidopsis thaliana In April 2023 (Yes, No)</text:p>
          </table:table-cell>
          <table:table-cell table:number-columns-repeated="16382"/>
        </table:table-row>
        <table:table-row table:style-name="ro7">
          <table:table-cell office:value-type="string" calcext:value-type="string">
            <text:p>Presence_April_24</text:p>
          </table:table-cell>
          <table:table-cell table:style-name="ce7" office:value-type="string" calcext:value-type="string">
            <text:p>Presence or absence of Arabidopsis thaliana In April 2024 (Yes, No)</text:p>
          </table:table-cell>
          <table:table-cell table:number-columns-repeated="16382"/>
        </table:table-row>
        <table:table-row table:style-name="ro8">
          <table:table-cell office:value-type="string" calcext:value-type="string">
            <text:p>Persistence</text:p>
          </table:table-cell>
          <table:table-cell office:value-type="string" calcext:value-type="string">
            <text:p><text:span text:style-name="T1">Quantified the population's ability to survive across years. </text:span></text:p>
            <text:p><text:span text:style-name="T2">0: no established population;</text:span></text:p>
            <text:p><text:span text:style-name="T1">1: one generation before extinction; </text:span></text:p>
            <text:p><text:span text:style-name="T1">2: two generations before extinction</text:span> (until April 2023); </text:p>
            <text:p>3: three generations, continued presence in April 2024)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Feb_22</text:p>
          </table:table-cell>
          <table:table-cell office:value-type="string" calcext:value-type="string">
            <text:p>Number of <text:span text:style-name="T3">A. thaliana</text:span> in February 2022</text:p>
          </table:table-cell>
          <table:table-cell table:number-columns-repeated="16382"/>
        </table:table-row>
        <table:table-row table:style-name="ro10">
          <table:table-cell office:value-type="string" calcext:value-type="string">
            <text:p>April_22</text:p>
          </table:table-cell>
          <table:table-cell office:value-type="string" calcext:value-type="string">
            <text:p><text:span text:style-name="T1">Number of </text:span><text:span text:style-name="T4">A. thaliana</text:span> in April 2022</text:p>
          </table:table-cell>
          <table:table-cell table:number-columns-repeated="16382"/>
        </table:table-row>
        <table:table-row table:style-name="ro11">
          <table:table-cell office:value-type="string" calcext:value-type="string">
            <text:p>October_22</text:p>
          </table:table-cell>
          <table:table-cell office:value-type="string" calcext:value-type="string">
            <text:p><text:span text:style-name="T1">Number of </text:span><text:span text:style-name="T4">A. thaliana</text:span> in October 2022</text:p>
          </table:table-cell>
          <table:table-cell table:number-columns-repeated="16382"/>
        </table:table-row>
        <table:table-row table:style-name="ro12">
          <table:table-cell office:value-type="string" calcext:value-type="string">
            <text:p>November_22</text:p>
          </table:table-cell>
          <table:table-cell office:value-type="string" calcext:value-type="string">
            <text:p><text:span text:style-name="T1">Number of </text:span><text:span text:style-name="T4">A. thaliana</text:span> in November 2022</text:p>
          </table:table-cell>
          <table:table-cell table:number-columns-repeated="16382"/>
        </table:table-row>
        <table:table-row table:style-name="ro12">
          <table:table-cell office:value-type="string" calcext:value-type="string">
            <text:p>April_23</text:p>
          </table:table-cell>
          <table:table-cell office:value-type="string" calcext:value-type="string">
            <text:p><text:span text:style-name="T1">Number of </text:span><text:span text:style-name="T4">A. thaliana</text:span> in April 2023</text:p>
          </table:table-cell>
          <table:table-cell table:number-columns-repeated="16382"/>
        </table:table-row>
        <table:table-row table:style-name="ro13">
          <table:table-cell office:value-type="string" calcext:value-type="string">
            <text:p>April_24</text:p>
          </table:table-cell>
          <table:table-cell office:value-type="string" calcext:value-type="string">
            <text:p><text:span text:style-name="T1">Number of </text:span><text:span text:style-name="T4">A. thaliana</text:span> in April 2024</text:p>
          </table:table-cell>
          <table:table-cell table:number-columns-repeated="16382"/>
        </table:table-row>
        <table:table-row table:style-name="ro14">
          <table:table-cell office:value-type="string" calcext:value-type="string">
            <text:p>Onset_FT_julianday</text:p>
          </table:table-cell>
          <table:table-cell office:value-type="string" calcext:value-type="string">
            <text:p>Julian day of first flowering per population in spring 2023; November 2022 flowering coded as –61; non‑flowering plants coded as day 120 (30 April).</text:p>
          </table:table-cell>
          <table:table-cell table:number-columns-repeated="16382"/>
        </table:table-row>
        <table:table-row table:style-name="ro15">
          <table:table-cell office:value-type="string" calcext:value-type="string">
            <text:p>FT_100%_julianday</text:p>
          </table:table-cell>
          <table:table-cell office:value-type="string" calcext:value-type="string">
            <text:p>Julian day when all individuals in the population had flowered; same coding conventions as Onset_FT_julianday.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FT_variation</text:p>
          </table:table-cell>
          <table:table-cell office:value-type="string" calcext:value-type="string">
            <text:p>Difference (days) between onset and completion of flowering per population; non‑flowering plants coded as day 120 (30 April).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Default"/>
          <table:table-cell table:number-columns-repeated="16382"/>
        </table:table-row>
      </table:table>
      <table:table table:name="Phenology_field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Default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number-columns-repeated="7" table:default-cell-style-name="Default"/>
        <table:table-column table:style-name="co3" table:number-columns-repeated="16354" table:default-cell-style-name="ce1"/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PS_ID</text:p>
          </table:table-cell>
          <table:table-cell office:value-type="string" calcext:value-type="string">
            <text:p>GPS_coordin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troyed</text:p>
          </table:table-cell>
          <table:table-cell office:value-type="string" calcext:value-type="string">
            <text:p>Sowing_1st</text:p>
          </table:table-cell>
          <table:table-cell office:value-type="string" calcext:value-type="string">
            <text:p>Sowing_2nd</text:p>
          </table:table-cell>
          <table:table-cell office:value-type="string" calcext:value-type="string">
            <text:p>Presence_April_22</text:p>
          </table:table-cell>
          <table:table-cell office:value-type="string" calcext:value-type="string">
            <text:p>Presence_April_23</text:p>
          </table:table-cell>
          <table:table-cell office:value-type="string" calcext:value-type="string">
            <text:p>Presence_April_24</text:p>
          </table:table-cell>
          <table:table-cell table:style-name="ce1" office:value-type="string" calcext:value-type="string">
            <text:p>Persistence</text:p>
          </table:table-cell>
          <table:table-cell office:value-type="string" calcext:value-type="string">
            <text:p>Feb_22</text:p>
          </table:table-cell>
          <table:table-cell office:value-type="string" calcext:value-type="string">
            <text:p>April_22</text:p>
          </table:table-cell>
          <table:table-cell office:value-type="string" calcext:value-type="string">
            <text:p>October_22</text:p>
          </table:table-cell>
          <table:table-cell office:value-type="string" calcext:value-type="string">
            <text:p>November_22</text:p>
          </table:table-cell>
          <table:table-cell office:value-type="string" calcext:value-type="string">
            <text:p>April_23</text:p>
          </table:table-cell>
          <table:table-cell office:value-type="string" calcext:value-type="string">
            <text:p>April_24</text:p>
          </table:table-cell>
          <table:table-cell office:value-type="string" calcext:value-type="string">
            <text:p>Onset_FT_julianday</text:p>
          </table:table-cell>
          <table:table-cell office:value-type="string" calcext:value-type="string">
            <text:p>FT_100%_julianday</text:p>
          </table:table-cell>
          <table:table-cell office:value-type="string" calcext:value-type="string">
            <text:p>FT_variation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table:number-columns-repeated="163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number-columns-repeated="163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table:number-columns-repeated="163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-61" calcext:value-type="float">
            <text:p>-61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table:number-columns-repeated="163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table:number-columns-repeated="163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61" calcext:value-type="float">
            <text:p>-61</text:p>
          </table:table-cell>
          <table:table-cell office:value-type="float" office:value="119" calcext:value-type="float">
            <text:p>119</text:p>
          </table:table-cell>
          <table:table-cell office:value-type="float" office:value="181" calcext:value-type="float">
            <text:p>181</text:p>
          </table:table-cell>
          <table:table-cell table:number-columns-repeated="163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table:number-columns-repeated="163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sdof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163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sdo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0.92058, 6.8589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sdo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0.92058, 6.8589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sdo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0.92058, 6.8589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rsdo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0.92058, 6.8589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table:number-columns-repeated="163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rsdo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91988, 6.8605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rsdo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91988, 6.8605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table:number-columns-repeated="163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rsdo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91988, 6.8605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rsdo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91988, 6.8605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sdo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91988, 6.8605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rsdo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91988, 6.8605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sdo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91988, 6.8605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table:number-columns-repeated="163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sdo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91988, 6.8605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rsdo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91988, 6.8605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rsdo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91988, 6.8605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rsdo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0.92088, 6.85562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rsdo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0.9209, 6.85575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163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rsdo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0.92088, 6.85562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sdo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0.9209, 6.85575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rsdo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0.92088, 6.85562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rsdo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0.9209, 6.85575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rsdo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0.92088, 6.85562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rsdo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0.92088, 6.85562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rsdo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0.9209, 6.85575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sdo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0.92143, 6.857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sdo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92359, 6.8515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rsdo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92359, 6.8515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rsdo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92359, 6.8515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rsdo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92359, 6.8515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rsdo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92359, 6.8515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rsdo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92359, 6.8515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sdo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92359, 6.8515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rsdo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92359, 6.8515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rsdo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92359, 6.8515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rsdo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92359, 6.8515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rsdo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92359, 6.8515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rsdo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92359, 6.8515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rsdo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92359, 6.8515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adiu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0.92437, 6.8689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10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adiu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0.92437, 6.8689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10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adiu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0.92437, 6.8689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10/2022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adiu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0.92437, 6.8689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10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diu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0.92437, 6.8689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10/2022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adiu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0.92437, 6.8689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10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adiu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0.92437, 6.8689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10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adiu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0.92437, 6.8689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10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adiu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0.92437, 6.8689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10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adiu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0.92437, 6.8689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10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1636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636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1636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1636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table:number-columns-repeated="1636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1636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1636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1636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table:number-columns-repeated="1636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1636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adi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0.92395, 6.8683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adiu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92467, 6.8688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1636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adiu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92467, 6.8688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1636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adiu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92467, 6.8688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number-columns-repeated="1636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adiu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92467, 6.8688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adiu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92467, 6.8688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1636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adiu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92467, 6.8688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adiu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92467, 6.8688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number-columns-repeated="1636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adiu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92467, 6.8688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table:number-columns-repeated="1636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adiu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92467, 6.8688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table:number-columns-repeated="1636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diu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92467, 6.8688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table:number-columns-repeated="1636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adiu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92467, 6.8688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table:number-columns-repeated="1636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ad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.92609, 6.8685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adi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93505, 6.8713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adi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93505, 6.8713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adi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93505, 6.8713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adi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93505, 6.8713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adi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93505, 6.8713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adi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93505, 6.8713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adi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93505, 6.8713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adi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93505, 6.8713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adi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93505, 6.8713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adi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93505, 6.8713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adi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93505, 6.8713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adi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93505, 6.8713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1636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adi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93505, 6.8713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adiu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0.9266, 6.86789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adiu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0.9266, 6.86789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adiu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0.9266, 6.86789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adiu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0.9266, 6.86789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adiu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0.9266, 6.86789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number-columns-repeated="1636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table:number-columns-repeated="1636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1636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1636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530" calcext:value-type="float">
            <text:p>530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1636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02" calcext:value-type="float">
            <text:p>402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636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1636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1636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1636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1636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1636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636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636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number-columns-repeated="1636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1636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636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ad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92669, 6.86733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636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number-columns-repeated="1636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number-columns-repeated="1636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1636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1636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636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1636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table:number-columns-repeated="1636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1636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1636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1636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adiu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0.92577, 6.867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1636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ülz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50.90775, 6.9195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ülz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50.90775, 6.9195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ülz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0.90758, 6.9199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ülz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0.90758, 6.9199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ülz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50.90763, 6.91949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ülz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0.909817, 6.91596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ülz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0.909817, 6.91596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ül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.91024, 6.91712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1636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ülz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.91092, 6.91789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table:number-columns-repeated="1636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ülz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50.91084, 6.91932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05/2022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ülz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50.91105, 6.91955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table:number-columns-repeated="1636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ül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91204, 6.92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ül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91204, 6.92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ül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91204, 6.92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ül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91204, 6.92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ül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91204, 6.92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ül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91204, 6.92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ül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91204, 6.92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ül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91204, 6.92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ül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91204, 6.92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ülz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.91408, 6.92326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ülz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.91408, 6.92326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ülz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.91408, 6.92326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ülz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.91408, 6.92326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ülz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.91408, 6.92326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ülz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ülz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ülz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ülz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ülz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ülz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ülz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ülz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ülz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ülz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ülz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ülz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ülz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ülz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ülz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ülz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ülz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50.91493, 6.9224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ülz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50.9156, 6.92152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ülz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50.9156, 6.92152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ülz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50.9156, 6.92152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1636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ülz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50.9156, 6.92152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ülz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0.91599, 6.92072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ülz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0.91599, 6.92072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ülz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50.91662, 6.9192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ülz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50.91662, 6.9192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1636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ülz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50.91662, 6.9192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number-columns-repeated="1636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ülz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0.91707, 6.9185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ülz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0.91707, 6.9185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table:number-columns-repeated="1636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ülz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50.92035, 6.9168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ülz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50.92035, 6.9168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table:number-columns-repeated="1636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ülz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50.92035, 6.9168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ülz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0.9168, 6.9065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ülz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0.9168, 6.9065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ülz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0.9168, 6.9065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1636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ülz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0.9168, 6.9065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number-columns-repeated="1636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ülz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0.9168, 6.9065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ülz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0.9168, 6.9065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table:number-columns-repeated="1636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ülz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0.9168, 6.9065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ülz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0.9168, 6.9065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ülz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0.9168, 6.9065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ülz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0.9168, 6.9065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ülz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0.91709, 6.9067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ülz</text:p>
          </table:table-cell>
          <table:table-cell office:value-type="float" office:value="34.1" calcext:value-type="float">
            <text:p>34.1</text:p>
          </table:table-cell>
          <table:table-cell office:value-type="string" calcext:value-type="string">
            <text:p>50.91656, 6.9061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ülz</text:p>
          </table:table-cell>
          <table:table-cell office:value-type="float" office:value="34.1" calcext:value-type="float">
            <text:p>34.1</text:p>
          </table:table-cell>
          <table:table-cell office:value-type="string" calcext:value-type="string">
            <text:p>50.91656, 6.9061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ülz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0.915365, 6.9064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ülz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0.915365, 6.9064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ülz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0.915365, 6.90643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ülz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0.915382, 6.90645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ülz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0.915298, 6.906283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ülz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0.915298, 6.906283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ülz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0.915298, 6.906283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ülz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0.915298, 6.906283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table:number-columns-repeated="1636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ülz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0.915298, 6.906283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ül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916112, 6.90566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ül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916112, 6.90566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ül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916112, 6.90566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ül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916112, 6.90566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ül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916112, 6.90566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ül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916112, 6.90566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ül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916112, 6.90566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ül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916112, 6.90566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ül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916112, 6.90566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ül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916112, 6.90566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ül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916112, 6.905667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table:number-columns-repeated="1636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07/2022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ül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912996, 6.901044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ülz</text:p>
          </table:table-cell>
          <table:table-cell office:value-type="string" calcext:value-type="string">
            <text:p>42-45</text:p>
          </table:table-cell>
          <table:table-cell office:value-type="string" calcext:value-type="string">
            <text:p>50.916702, 6.899780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number-columns-repeated="1636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ülz</text:p>
          </table:table-cell>
          <table:table-cell office:value-type="string" calcext:value-type="string">
            <text:p>42-45</text:p>
          </table:table-cell>
          <table:table-cell office:value-type="string" calcext:value-type="string">
            <text:p>50.916702, 6.899780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ülz</text:p>
          </table:table-cell>
          <table:table-cell office:value-type="string" calcext:value-type="string">
            <text:p>42-45</text:p>
          </table:table-cell>
          <table:table-cell office:value-type="string" calcext:value-type="string">
            <text:p>50.916702, 6.899780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ülz</text:p>
          </table:table-cell>
          <table:table-cell office:value-type="string" calcext:value-type="string">
            <text:p>42-45</text:p>
          </table:table-cell>
          <table:table-cell office:value-type="string" calcext:value-type="string">
            <text:p>50.916702, 6.899780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ülz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.917165, 6.90013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ülz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.917165, 6.90013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ülz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.917165, 6.90013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ülz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.917165, 6.90013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ülz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.917165, 6.90013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ülz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917963, 6.898724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ülz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917963, 6.898724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ülz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0.917942, 6.898645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ülz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917862, 6.89582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ülz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917862, 6.89582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ülz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917862, 6.89582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ülz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0.917710, 6.894989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ülz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0.917633, 6.89298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ülz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0.917633, 6.89298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ülz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0.917633, 6.89298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ülz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0.917633, 6.89298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ülz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0.917633, 6.89298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ülz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0.917633, 6.89298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aarweg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50.93873, 6.8996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aarwe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50.9399, 6.8970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Maarwe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50.9399, 6.8970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aarwe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50.93987, 6.8966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number-columns-repeated="1636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aarwe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50.93987, 6.8966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Maarwe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50.93987, 6.8966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number-columns-repeated="1636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Maarwe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50.93987, 6.8966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aarwe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50.93987, 6.8966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aarwe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50.94037, 6.89764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aarwe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50.94037, 6.89764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Maarwe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50.94037, 6.89764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aarwe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50.94037, 6.89764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aarwe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50.94192, 6.89949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table:number-columns-repeated="1636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Maarwe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50.94192, 6.89949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aarwe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50.94192, 6.89949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aarwe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50.94192, 6.89949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aarwe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50.94192, 6.89949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aarwe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50.94343, 6.8976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aarwe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50.94343, 6.8976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table:number-columns-repeated="1636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arwe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50.94343, 6.8976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table:number-columns-repeated="1636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aarwe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50.94343, 6.8976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aarwe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50.94343, 6.8976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table:number-columns-repeated="1636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Maarwe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50.94343, 6.8976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aarweg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50.94512, 6.8945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4/2024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aarweg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50.94512, 6.8945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4/2024</text:p>
          </table:table-cell>
          <table:table-cell office:value-type="string" calcext:value-type="string">
            <text:p>09/202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aarweg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50.94512, 6.8945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aarweg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50.94512, 6.8945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aarweg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50.94512, 6.8945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arwe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50.94783, 6.89116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1636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aarwe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50.94783, 6.89116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aarwe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50.94777, 6.89124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1636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Maarwe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50.94777, 6.89124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1636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aarwe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50.94689, 6.8904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table:number-columns-repeated="1636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aarwe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50.94689, 6.8904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1636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aarwe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50.94654, 6.8897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aarwe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50.94654, 6.8897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table:number-columns-repeated="1636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Maarwe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50.94654, 6.8897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Maarwe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50.94654, 6.8897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Maarwe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50.94654, 6.8897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aarwe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50.9462, 6.88965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9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aarwe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50.9462, 6.88965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9/2022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aarwe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50.9462, 6.88965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9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Maarwe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50.946, 6.8897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Maarwe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50.946, 6.8897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aarwe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94247, 6.8886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10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Maarwe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94247, 6.8886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Maarwe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94247, 6.8886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aarwe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94247, 6.8886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Maarwe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94247, 6.8886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aarwe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94247, 6.88869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aarwe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50.94378, 6.8854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aarwe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50.94378, 6.8854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aarwe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50.94378, 6.8854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Maarweg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0.94377, 6.8852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Maarweg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0.94377, 6.8852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Maarweg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0.94377, 6.8852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aarweg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0.94377, 6.88527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Maarwe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0.94217, 6.8839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aarwe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0.94217, 6.8839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aarwe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0.94217, 6.8839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aarwe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0.94217, 6.8839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aarwe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0.94217, 6.8839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aarwe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0.94217, 6.8839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number-columns-repeated="1636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Maarwe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0.94217, 6.8839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number-columns-repeated="1636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aarwe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0.9408, 6.88494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aarwe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0.9408, 6.88494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table:number-columns-repeated="1636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aarwe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0.9408, 6.88494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aarwe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0.9408, 6.88494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Maarwe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0.9408, 6.88494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aarwe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0.94078, 6.8857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02/202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aarwe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0.94078, 6.8857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hei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50.90139, 6.9843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hei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50.90205, 6.983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table:number-columns-repeated="1636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hei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50.90205, 6.983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1636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Rhei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50.90404, 6.98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636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Rhei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50.90404, 6.98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hei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50.90471, 6.9803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Rhei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50.90472, 6.9803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  <table:table-cell table:number-columns-repeated="1636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Rhei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50.90528, 6.9797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Rhei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50.90536, 6.9796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number-columns-repeated="1636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Rhei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50.90581, 6.97919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number-columns-repeated="1636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Rhei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0.90597, 6.9790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82" calcext:value-type="float">
            <text:p>82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number-columns-repeated="1636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Rhei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50.90591, 6.97899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Rhei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50.90791, 6.977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number-columns-repeated="1636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Rhei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50.90791, 6.977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number-columns-repeated="1636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Rhei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number-columns-repeated="1636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Rhei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number-columns-repeated="1636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Rhei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0.92538, 6.8951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table:number-columns-repeated="1636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Zollstoc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50.92487, 6.94288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Zollstoc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50.92487, 6.94288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7" calcext:value-type="float">
            <text:p>277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table:number-columns-repeated="1636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Zollstoc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50.92487, 6.94288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Zollstoc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50.92487, 6.94288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Zollstoc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50.92487, 6.94288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Zollstoc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50.92487, 6.94288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Zollstoc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50.92487, 6.94288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Zollstoc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50.92487, 6.94288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Zollstock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0.9211, 6.94098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number-columns-repeated="1636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Zollstock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0.9211, 6.94098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Zollstock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0.9211, 6.94098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Zollstock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0.9211, 6.94098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Zollstock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50.91929, 6.9415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Zollstock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50.91929, 6.9415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Zollstock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50.91929, 6.94152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table:number-columns-repeated="1636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Zollstock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50.91896, 6.94235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76" calcext:value-type="float">
            <text:p>176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1636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Zollstock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50.91896, 6.94235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Zollstock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50.91896, 6.94235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Zollstock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0.91896, 6.94241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table:number-columns-repeated="1636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Zollstock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50.91896, 6.9426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27" calcext:value-type="float">
            <text:p>227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float" office:value="49" calcext:value-type="float">
            <text:p>49</text:p>
          </table:table-cell>
          <table:table-cell table:number-columns-repeated="1636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Zollstock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50.91896, 6.94265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table:number-columns-repeated="1636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Zollstock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0.91846, 6.94486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table:number-columns-repeated="1636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Zollstock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0.91846, 6.94486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number-columns-repeated="1636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Zollstock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0.91846, 6.94486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table:number-columns-repeated="1636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Zollstock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0.91689, 6.94846</text:p>
          </table:table-cell>
          <table:table-cell office:value-type="string" calcext:value-type="string">
            <text:p>Tree b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table:number-columns-repeated="1636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Zollstock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0.91689, 6.94846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number-columns-repeated="1636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Zollstock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0.91354, 6.9438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float" office:value="49" calcext:value-type="float">
            <text:p>49</text:p>
          </table:table-cell>
          <table:table-cell table:number-columns-repeated="1636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Zollstock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0.91354, 6.94381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Zollstock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50.91354, 6.94383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table:number-columns-repeated="1636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Zollstock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50.91354, 6.9438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number-columns-repeated="1636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Zollstock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50.91354, 6.94383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38" calcext:value-type="float">
            <text:p>238</text:p>
          </table:table-cell>
          <table:table-cell office:value-type="float" office:value="284" calcext:value-type="float">
            <text:p>28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number-columns-repeated="1636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Zollstock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50.91261, 6.9405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table:number-columns-repeated="1636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Zollstock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50.91261, 6.9405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number-columns-repeated="1636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Zollstock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50.91261, 6.9405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83" calcext:value-type="float">
            <text:p>83</text:p>
          </table:table-cell>
          <table:table-cell office:value-type="float" office:value="216" calcext:value-type="float">
            <text:p>21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number-columns-repeated="1636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Zollstock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50.91261, 6.9405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Zollstock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50.91057, 6.9346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table:number-columns-repeated="1636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Zollstock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50.91057, 6.9346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table:number-columns-repeated="1636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Zollstock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50.91057, 6.9346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 table:number-columns-repeated="1636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Zollstock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50.91057, 6.93467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table:number-columns-repeated="1636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ülz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50.9176, 6.9301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table:number-columns-repeated="1636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ülz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50.9176, 6.9301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04/2023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ülz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50.9176, 6.9301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81" calcext:value-type="float">
            <text:p>281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float" office:value="49" calcext:value-type="float">
            <text:p>49</text:p>
          </table:table-cell>
          <table:table-cell table:number-columns-repeated="1636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ül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50.91699, 6.9304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number-columns-repeated="1636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ül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50.91699, 6.9304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ül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50.91699, 6.9304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1636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ül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50.91699, 6.9304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97" calcext:value-type="float">
            <text:p>69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1636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ülz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0.91653, 6.9300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table:number-columns-repeated="1636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ülz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0.91653, 6.9300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ülz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50.91631, 6.92985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number-columns-repeated="1636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ülz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50.91631, 6.92985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number-columns-repeated="1636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ülz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50.91631, 6.92985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table:number-columns-repeated="1636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ülz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50.91631, 6.92985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1636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ülz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50.91631, 6.92985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 table:number-columns-repeated="1636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ül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50.9151, 6.92998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94" calcext:value-type="float">
            <text:p>694</text:p>
          </table:table-cell>
          <table:table-cell office:value-type="float" office:value="234" calcext:value-type="float">
            <text:p>234</text:p>
          </table:table-cell>
          <table:table-cell office:value-type="float" office:value="278" calcext:value-type="float">
            <text:p>278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number-columns-repeated="1636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ül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50.9151, 6.92998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04/2023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6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ül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50.9151, 6.92998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table:number-columns-repeated="1636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ül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50.9151, 6.92998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table:number-columns-repeated="1636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ülz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50.91512, 6.93145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table:number-columns-repeated="1636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ülz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50.91609, 6.9323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ülz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50.91618, 6.9334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table:number-columns-repeated="1636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ülz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50.91618, 6.9334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table:number-columns-repeated="1636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ülz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50.91618, 6.9334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number-columns-repeated="1636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ülz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50.91618, 6.9334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number-columns-repeated="16361"/>
        </table:table-row>
        <table:table-row table:style-name="ro1" table:number-rows-repeated="1048083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  <table:database-ranges>
        <table:database-range table:name="__Anonymous_Sheet_DB__1" table:target-range-address="Phenology_field.A1:Phenology_field.U49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/</number:text>
      <number:month number:style="long"/>
      <number:text>/</number:text>
      <number:year/>
    </number:date-style>
    <number:date-style style:name="N134">
      <number:day/>
      <number:text>-</number:text>
      <number:month/>
    </number:date-style>
    <number:date-style style:name="N135">
      <number:day/>
      <number:text>/</number:text>
      <number:month/>
      <number:text>/</number:text>
      <number:year number:style="long"/>
    </number:date-style>
    <number:date-style style:name="N136">
      <number:day number:style="long"/>
      <number:text>/</number:text>
      <number:month number:style="long"/>
      <number:text>/</number:text>
      <number:year number:style="long"/>
    </number:date-style>
    <number:date-style style:name="N137">
      <number:day number:style="long"/>
      <number:text>/</number:text>
      <number:month number:style="long"/>
    </number:date-style>
    <number:date-style style:name="N138">
      <number:month number:style="long"/>
      <number:text>/</number:text>
      <number:year number:style="long"/>
    </number:date-style>
    <number:date-style style:name="N139">
      <number:day/>
      <number:text>.</number:text>
      <number:month/>
    </number:date-style>
    <number:date-style style:name="N140">
      <number:day/>
      <number:text>.</number:text>
      <number:month/>
      <number:text>.</number:text>
    </number:date-style>
    <number:date-style style:name="N141">
      <number:day number:style="long"/>
      <number:text>.</number:text>
      <number:month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 style:data-style-name="N2" text:time-value="16:06:13.5113421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7-04T16:09:21.442011468</dc:date>
    <meta:editing-duration>PT1H7M47S</meta:editing-duration>
    <meta:editing-cycles>10</meta:editing-cycles>
    <meta:document-statistic meta:table-count="2" meta:cell-count="10381" meta:object-count="0"/>
    <meta:user-defined meta:name=""/>
  </office:meta>
</office:document-meta>
</file>